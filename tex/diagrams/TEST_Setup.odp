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0736B44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2cm" fo:min-width="0.036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31cm, 6.867cm, 0cm, 15.441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60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69cm" loext:decorative="false"/>
      <style:paragraph-properties style:writing-mode="lr-tb"/>
    </style:style>
    <style:style style:name="gr6" style:family="graphic" style:parent-style-name="objectwithoutfill">
      <style:graphic-properties svg:stroke-width="0.159cm" svg:stroke-color="#c71585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49cm" fo:min-width="2.284cm" fo:padding-top="0.178cm" fo:padding-bottom="0.178cm" fo:padding-left="0.303cm" fo:padding-right="0.303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236cm" fo:min-width="1.381cm" fo:padding-top="0.178cm" fo:padding-bottom="0.178cm" fo:padding-left="0.303cm" fo:padding-right="0.303cm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heads_20_2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212cm" svg:stroke-color="#ff0000" draw:marker-start-width="0.518cm" draw:marker-end="Arrowheads_20_2" draw:marker-end-width="0.518cm" draw:fill="none" draw:textarea-vertical-align="middle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236cm" fo:min-width="1.844cm" fo:padding-top="0.178cm" fo:padding-bottom="0.178cm" fo:padding-left="0.303cm" fo:padding-right="0.30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00" loext:opacity="100%" fo:font-size="22pt" fo:background-color="#000000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color="#ffff00" loext:opacity="100%" fo:font-size="22pt" fo:background-color="#000000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0.536cm" svg:height="0.502cm" svg:x="6.656cm" svg:y="5.09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358cm" svg:height="12.262cm" svg:x="14.415cm" svg:y="0.168cm">
          <draw:image xlink:href="Pictures/1000000000000FC000000BD00736B44D.jpg" xlink:type="simple" xlink:show="embed" xlink:actuate="onLoad" draw:mime-type="image/jpeg">
            <text:p/>
          </draw:image>
        </draw:frame>
        <draw:frame draw:style-name="gr3" draw:text-style-name="P3" draw:layer="layout" svg:width="4.637cm" svg:height="2.855cm" svg:x="11.521cm" svg:y="6.985cm">
          <draw:text-box>
            <text:p><text:span text:style-name="T1"><text:s/></text:span><text:span text:style-name="T1">Function <text:s/>Generator </text:span></text:p>
            <text:p><text:span text:style-name="T1">Input </text:span></text:p>
          </draw:text-box>
        </draw:frame>
        <draw:frame draw:style-name="gr4" draw:text-style-name="P3" draw:layer="layout" svg:width="10.544cm" svg:height="1.987cm" svg:x="13.464cm" svg:y="13.213cm">
          <draw:text-box>
            <text:p><text:span text:style-name="T1">Constant Current Source w/ Modulation In </text:span></text:p>
          </draw:text-box>
        </draw:frame>
        <draw:frame draw:style-name="gr5" draw:text-style-name="P3" draw:layer="layout" svg:width="2.298cm" svg:height="1.119cm" svg:x="19.628cm" svg:y="11.032cm">
          <draw:text-box>
            <text:p><text:span text:style-name="T1">LED </text:span></text:p>
          </draw:text-box>
        </draw:frame>
        <draw:frame draw:style-name="gr4" draw:text-style-name="P3" draw:layer="layout" svg:width="5.389cm" svg:height="1.987cm" svg:x="23.582cm" svg:y="10.588cm">
          <draw:text-box>
            <text:p><text:span text:style-name="T1">InGaAs Photodiode </text:span></text:p>
          </draw:text-box>
        </draw:frame>
        <draw:line draw:style-name="gr6" draw:text-style-name="P4" draw:layer="layout" svg:x1="18.41cm" svg:y1="13.346cm" svg:x2="17.318cm" svg:y2="12.39cm">
          <text:p/>
        </draw:line>
        <draw:line draw:style-name="gr6" draw:text-style-name="P4" draw:layer="layout" svg:x1="20.703cm" svg:y1="11.245cm" svg:x2="22.598cm" svg:y2="6.332cm">
          <text:p/>
        </draw:line>
        <draw:line draw:style-name="gr6" draw:text-style-name="P4" draw:layer="layout" svg:x1="25.148cm" svg:y1="10.774cm" svg:x2="23.122cm" svg:y2="6.313cm">
          <text:p/>
        </draw:line>
        <draw:line draw:style-name="gr6" draw:text-style-name="P4" draw:layer="layout" svg:x1="14.317cm" svg:y1="8.929cm" svg:x2="16.082cm" svg:y2="10.536cm">
          <text:p/>
        </draw:line>
        <draw:custom-shape draw:style-name="gr7" draw:text-style-name="P2" xml:id="id1" draw:id="id1" draw:layer="layout" svg:width="2.89cm" svg:height="2.505cm" svg:x="1.044cm" svg:y="8.45cm">
          <text:p text:style-name="P2">Const.</text:p>
          <text:p text:style-name="P2">Current</text:p>
          <text:p text:style-name="P2">Driver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1.987cm" svg:height="1.592cm" svg:x="4.944cm" svg:y="8.95cm">
          <text:p text:style-name="P2">LED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1.987cm" svg:height="1.592cm" svg:x="7.944cm" svg:y="8.95cm">
          <text:p text:style-name="P2">P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3.934cm" svg:y1="9.702cm" svg:x2="4.944cm" svg:y2="9.746cm" draw:start-shape="id1" draw:start-glue-point="1" draw:end-shape="id2" draw:end-glue-point="3" svg:d="M3934 9702c757 0 253 44 1010 44" svg:viewBox="0 0 1011 45">
          <text:p/>
        </draw:connector>
        <draw:connector draw:style-name="gr10" draw:text-style-name="P4" draw:layer="layout" draw:type="curve" svg:x1="6.931cm" svg:y1="9.746cm" svg:x2="7.944cm" svg:y2="9.746cm" draw:start-shape="id2" draw:start-glue-point="1" draw:end-shape="id3" draw:end-glue-point="3" svg:d="M6931 9746h1013" svg:viewBox="0 0 1014 1">
          <text:p/>
        </draw:connector>
        <draw:connector draw:style-name="gr9" draw:text-style-name="P4" draw:layer="layout" draw:type="curve" svg:x1="9.931cm" svg:y1="9.746cm" svg:x2="6.924cm" svg:y2="5.596cm" draw:start-shape="id3" draw:start-glue-point="1" draw:end-shape="id4" draw:end-glue-point="2" svg:d="M9931 9746c828 0 691-1249-268-1668s-2739-6-2739-2482" svg:viewBox="0 0 3553 4151">
          <text:p/>
        </draw:connector>
        <draw:custom-shape draw:style-name="gr1" draw:text-style-name="P1" xml:id="id5" draw:id="id5" draw:layer="layout" svg:width="0.536cm" svg:height="0.502cm" svg:x="5.356cm" svg:y="5.094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5.624cm" svg:y1="5.596cm" svg:x2="2.489cm" svg:y2="8.45cm" draw:start-shape="id5" draw:start-glue-point="2" draw:end-shape="id1" draw:end-glue-point="0" svg:d="M5624 5596c0 2100-3135 673-3135 2854" svg:viewBox="0 0 3136 2855">
          <text:p/>
        </draw:connector>
        <draw:custom-shape draw:style-name="gr1" draw:text-style-name="P1" xml:id="id6" draw:id="id6" draw:layer="layout" svg:width="0.536cm" svg:height="0.502cm" svg:x="6.056cm" svg:y="5.094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5.624cm" svg:y1="5.596cm" svg:x2="6.324cm" svg:y2="5.596cm" draw:start-shape="id5" draw:start-glue-point="2" draw:end-shape="id6" draw:end-glue-point="2" svg:d="M5624 5596c0 750 700 750 700 0" svg:viewBox="0 0 701 564">
          <text:p/>
        </draw:connector>
        <draw:custom-shape draw:style-name="gr11" draw:text-style-name="P2" draw:layer="layout" svg:width="2.45cm" svg:height="1.592cm" svg:x="4.944cm" svg:y="3.95cm">
          <text:p text:style-name="P2">Scope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219cm" svg:height="2.384cm" svg:x="2.314cm" svg:y="5.545cm">
          <draw:text-box>
            <text:p>Func. </text:p>
            <text:p>Gen</text:p>
          </draw:text-box>
        </draw:frame>
        <draw:frame draw:style-name="gr12" draw:text-style-name="P5" draw:layer="layout" svg:width="2.219cm" svg:height="2.384cm" svg:x="5.215cm" svg:y="6.245cm">
          <draw:text-box>
            <text:p>Ch2</text:p>
          </draw:text-box>
        </draw:frame>
        <draw:frame draw:style-name="gr12" draw:text-style-name="P5" draw:layer="layout" svg:width="2.219cm" svg:height="2.384cm" svg:x="7.116cm" svg:y="6.145cm">
          <draw:text-box>
            <text:p>Ch1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4cm" fo:margin-bottom="0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8cm" fo:margin-bottom="0cm" fo:text-indent="0cm"/>
      <style:text-properties fo:font-size="23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99cm" svg:x="1cm" svg:y="3.823cm"/>
      <draw:page-thumbnail draw:layer="backgroundobjects" svg:width="8.999cm" svg:height="4.899cm" svg:x="1cm" svg:y="12.399cm"/>
      <draw:page-thumbnail draw:layer="backgroundobjects" svg:width="8.999cm" svg:height="4.899cm" svg:x="1cm" svg:y="20.975cm"/>
      <draw:page-thumbnail draw:layer="backgroundobjects" svg:width="8.999cm" svg:height="4.899cm" svg:x="11cm" svg:y="3.823cm"/>
      <draw:page-thumbnail draw:layer="backgroundobjects" svg:width="8.999cm" svg:height="4.899cm" svg:x="11cm" svg:y="12.399cm"/>
      <draw:page-thumbnail draw:layer="backgroundobjects" svg:width="8.999cm" svg:height="4.899cm" svg:x="11cm" svg:y="20.97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544cm" svg:x="1.399cm" svg:y="0.605cm" presentation:class="title" presentation:placeholder="true">
        <draw:text-box/>
      </draw:frame>
      <draw:frame presentation:style-name="Default-outline1" draw:layer="backgroundobjects" svg:width="25.191cm" svg:height="8.838cm" svg:x="1.399cm" svg:y="3.564cm" presentation:class="outline" presentation:placeholder="true">
        <draw:text-box/>
      </draw:frame>
      <draw:frame presentation:style-name="Mpr1" draw:text-style-name="MP2" draw:layer="backgroundobjects" svg:width="6.521cm" svg:height="1.05cm" svg:x="1.399cm" svg:y="13.88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5cm" svg:x="9.571cm" svg:y="13.88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5cm" svg:x="20.068cm" svg:y="13.88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7T15:30:50.039427295</meta:creation-date>
    <dc:date>2026-07-22T17:13:24.581435764</dc:date>
    <meta:editing-duration>PT5M22S</meta:editing-duration>
    <meta:editing-cycles>3</meta:editing-cycles>
    <meta:generator>LibreOffice/24.2.7.2$Linux_X86_64 LibreOffice_project/420$Build-2</meta:generator>
    <meta:document-statistic meta:object-count="47"/>
  </office:meta>
</office:document-meta>
</file>